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BE000001A032831821.png" manifest:media-type="image/png"/>
  <manifest:file-entry manifest:full-path="Pictures/10000001000000AD00000077058DDA17.png" manifest:media-type="image/png"/>
  <manifest:file-entry manifest:full-path="Pictures/100000010000012C0000006C69D056BB.png" manifest:media-type="image/png"/>
  <manifest:file-entry manifest:full-path="Pictures/100000000000064000000384DD9B8BE4.jpg" manifest:media-type="image/jpeg"/>
  <manifest:file-entry manifest:full-path="Pictures/1000000100000424000004241E48035B.png" manifest:media-type="image/png"/>
  <manifest:file-entry manifest:full-path="Pictures/1000000000000640000003847C7EC4DD.jpg" manifest:media-type="image/jpeg"/>
  <manifest:file-entry manifest:full-path="Pictures/100000000000064000000384F55E27E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_31__5f_Title_20_Slide-title">
      <style:graphic-properties draw:stroke="none" svg:stroke-width="0cm" draw:fill="none" loext:fill-use-slide-background="false" draw:textarea-horizontal-align="right" draw:textarea-vertical-align="middle" draw:auto-grow-height="false" draw:fit-to-size="false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 loext:decorative="false"/>
      <style:paragraph-properties style:writing-mode="lr-tb"/>
    </style:style>
    <style:style style:name="pr2" style:family="presentation" style:parent-style-name="_31__5f_Title_20_Slide-subtitle">
      <style:graphic-properties draw:stroke="none" svg:stroke-width="0cm" draw:fill="none" draw:fill-color="#ffffff" loext:fill-use-slide-background="false" draw:textarea-horizontal-align="right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_31__5f_Title_20_Slide-subtitle">
      <style:graphic-properties draw:stroke="none" svg:stroke-width="0cm" draw:fill="none" draw:fill-color="#ffffff" loext:fill-use-slide-background="false" draw:textarea-horizontal-align="center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8" style:family="presentation" style:parent-style-name="Blank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Blank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Blank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Blank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Blank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Blank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 loext:decorative="false"/>
      <style:paragraph-properties style:writing-mode="lr-tb"/>
    </style:style>
    <style:style style:name="pr15" style:family="presentation" style:parent-style-name="Blank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right"/>
    </style:style>
    <style:style style:name="P2" style:family="paragraph">
      <loext:graphic-properties draw:fill="none"/>
      <style:paragraph-properties fo:text-align="center" style:font-independent-line-spacing="true"/>
      <style:text-properties style:text-outline="true" fo:font-size="36pt" fo:text-shadow="1pt 1pt" fo:background-color="transparent"/>
    </style:style>
    <style:style style:name="P3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left" style:font-independent-line-spacing="true"/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left" style:font-independent-line-spacing="true"/>
      <style:text-properties style:text-outline="true" fo:font-size="36pt" fo:text-shadow="1pt 1pt"/>
    </style:style>
    <style:style style:name="P11" style:family="paragraph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size="26pt" style:font-size-asian="26pt" style:font-size-complex="26pt"/>
    </style:style>
    <style:style style:name="P12" style:family="paragraph">
      <loext:graphic-properties draw:fill="none"/>
      <style:paragraph-properties fo:text-align="left" style:font-independent-line-spacing="true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margin-top="0.169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left" style:font-independent-line-spacing="true"/>
      <style:text-properties fo:font-size="36pt"/>
    </style:style>
    <style:style style:name="T1" style:family="text">
      <style:text-properties fo:font-variant="normal" fo:text-transform="none" fo:color="#ffffff" loext:opacity="100%" style:text-outline="true" style:text-line-through-style="none" style:text-line-through-type="none" style:text-position="0% 100%" style:font-name="Calibri" fo:font-size="36pt" fo:letter-spacing="normal" fo:language="en" fo:country="US" fo:font-style="normal" fo:text-shadow="1pt 1pt" style:text-underline-style="none" fo:font-weight="normal" fo:background-color="transparent" style:font-name-asian="Noto Serif CJK SC" style:font-size-asian="36pt" style:font-style-asian="normal" style:font-weight-asian="normal" style:font-name-complex="Liberation Serif1" style:font-size-complex="36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true" style:text-line-through-style="none" style:text-line-through-type="none" style:text-position="0% 100%" style:font-name="Calibri" fo:font-size="18pt" fo:letter-spacing="normal" fo:language="en" fo:country="US" fo:font-style="normal" fo:text-shadow="1pt 1pt" style:text-underline-style="none" fo:font-weight="normal" fo:background-color="transparent" style:font-name-asian="Noto Serif CJK SC" style:font-size-asian="18pt" style:font-style-asian="normal" style:font-weight-asian="normal" style:font-name-complex="Liberation Serif1" style:font-size-complex="18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true" style:text-line-through-style="none" style:text-line-through-type="none" style:text-position="0% 100%" style:font-name="Calibri" fo:font-size="36pt" fo:letter-spacing="normal" fo:language="en" fo:country="US" fo:font-style="normal" fo:text-shadow="1pt 1pt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f89bff" loext:opacity="100%" style:text-outline="true" style:text-line-through-style="none" style:text-line-through-type="none" style:text-position="0% 100%" style:font-name="Calibri" fo:font-size="36pt" fo:letter-spacing="normal" fo:language="en" fo:country="US" fo:font-style="normal" fo:text-shadow="1pt 1pt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 presentation:presentation-page-layout-name="AL1T0">
        <draw:frame draw:name="Title 1" presentation:style-name="pr1" draw:text-style-name="P2" draw:layer="layout" svg:width="22.787cm" svg:height="3.789cm" svg:x="0.564cm" svg:y="5.244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1">Security Infrastructure Lab</text:span></text:p>
                  </text:list-header>
                </text:list>
              </text:list-item>
            </text:list>
          </draw:text-box>
        </draw:frame>
        <draw:frame draw:name="Subtitle 1" presentation:style-name="pr2" draw:text-style-name="P4" draw:layer="layout" svg:width="21.303cm" svg:height="2.12cm" svg:x="1.197cm" svg:y="10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3"><text:span text:style-name="T1">Complete Virtual Environment</text:span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4.5cm" svg:height="3.096cm" svg:x="19cm" svg:y="0.5cm">
          <draw:image xlink:href="Pictures/10000001000000AD00000077058DDA17.png" xlink:type="simple" xlink:show="embed" xlink:actuate="onLoad" draw:mime-type="image/png">
            <text:p/>
          </draw:image>
        </draw:frame>
        <draw:frame draw:style-name="gr1" draw:text-style-name="P5" draw:layer="layout" svg:width="3cm" svg:height="3cm" svg:x="0.5cm" svg:y="0.5cm">
          <draw:image xlink:href="Pictures/1000000100000424000004241E48035B.png" xlink:type="simple" xlink:show="embed" xlink:actuate="onLoad" draw:mime-type="image/png">
            <text:p/>
          </draw:image>
        </draw:frame>
        <draw:frame draw:name="Subtitle 2" presentation:style-name="pr3" draw:text-style-name="P7" draw:layer="layout" svg:width="6.303cm" svg:height="1cm" svg:x="19cm" svg:y="12.5cm">
          <draw:text-box>
            <text:list text:style-name="L1">
              <text:list-item>
                <text:list>
                  <text:list-header>
                    <text:p text:style-name="P6"><text:span text:style-name="T2">Stephen Reill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PlaceHolder 1" presentation:style-name="pr5" draw:text-style-name="P10" draw:layer="layout" svg:width="22.904cm" svg:height="2.119cm" svg:x="1.227cm" svg:y="0.971cm" presentation:class="title" presentation:user-transformed="true">
          <draw:text-box>
            <text:p text:style-name="P9"><text:span text:style-name="T3">What is it?</text:span></text:p>
          </draw:text-box>
        </draw:frame>
        <draw:frame draw:name="PlaceHolder 2" presentation:style-name="pr6" draw:text-style-name="P12" draw:layer="layout" svg:width="22.904cm" svg:height="8.67cm" svg:x="1.345cm" svg:y="4.797cm" presentation:class="outline" presentation:user-transformed="true">
          <draw:text-box>
            <text:list text:style-name="L3">
              <text:list-item>
                <text:p text:style-name="P11"><text:span text:style-name="T4">It’s a completely virtualized network environment</text:span></text:p>
              </text:list-item>
              <text:list-item>
                <text:p text:style-name="P11"><text:span text:style-name="T4">Can be used to simulate most real world networks (financial, medical, corporate...)</text:span></text:p>
              </text:list-item>
              <text:list-item>
                <text:p text:style-name="P11"><text:span text:style-name="T4">Full security suite included</text:span></text:p>
              </text:list-item>
              <text:list-item>
                <text:p text:style-name="P11"><text:span text:style-name="T4">We would have to build it, brick by brick</text:span></text:p>
              </text:list-item>
              <text:list-item>
                <text:p text:style-name="P11"><text:span text:style-name="T4">Blue Team creates scopes, Red Team attacks,</text:span></text:p>
                <text:p text:style-name="P11"><text:span text:style-name="T4">we fix holes, repeat and improve as we learn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frame draw:style-name="gr1" draw:text-style-name="P5" draw:layer="layout" svg:width="24.899cm" svg:height="4.72cm" svg:x="0.301cm" svg:y="6cm">
          <draw:image xlink:href="Pictures/10000001000008BE000001A032831821.png" xlink:type="simple" xlink:show="embed" xlink:actuate="onLoad" draw:mime-type="image/png">
            <text:p/>
          </draw:image>
        </draw:frame>
        <draw:frame draw:name="PlaceHolder 9" presentation:style-name="pr8" draw:text-style-name="P10" draw:layer="layout" svg:width="22.904cm" svg:height="2.119cm" svg:x="1.227cm" svg:y="0.972cm" presentation:class="title" presentation:user-transformed="true">
          <draw:text-box>
            <text:p text:style-name="P9"><text:span text:style-name="T3">An entire network in a box example:</text:span></text:p>
          </draw:text-box>
        </draw:frame>
        <presentation:notes draw:style-name="dp3">
          <draw:page-thumbnail draw:name="PlaceHolder 6" draw:style-name="gr2" draw:layer="layout" svg:width="15.238cm" svg:height="8.571cm" svg:x="1.905cm" svg:y="3.175cm" draw:page-number="3" presentation:class="page"/>
          <draw:frame draw:name="PlaceHolder 7" presentation:style-name="pr9" draw:text-style-name="P13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8" presentation:style-name="pr10" draw:text-style-name="P15" draw:layer="layout" svg:width="8.253cm" svg:height="1.272cm" svg:x="10.791cm" svg:y="24.126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Blank">
        <draw:frame draw:name="PlaceHolder 3" presentation:style-name="pr8" draw:text-style-name="P10" draw:layer="layout" svg:width="16.242cm" svg:height="2.013cm" svg:x="7.886cm" svg:y="1.253cm" presentation:class="title" presentation:user-transformed="true">
          <draw:text-box>
            <text:p text:style-name="P9"><text:span text:style-name="T3">Some ideas on what to deploy</text:span></text:p>
          </draw:text-box>
        </draw:frame>
        <draw:frame draw:name="PlaceHolder 4" presentation:style-name="pr11" draw:text-style-name="P17" draw:layer="layout" svg:width="11.221cm" svg:height="1.331cm" svg:x="1.492cm" svg:y="4.436cm" presentation:class="outline" presentation:user-transformed="true">
          <draw:text-box>
            <text:p text:style-name="P16"><text:span text:style-name="T6">Security Tech</text:span></text:p>
          </draw:text-box>
        </draw:frame>
        <draw:frame draw:name="PlaceHolder 22" presentation:style-name="pr12" draw:text-style-name="P17" draw:layer="layout" svg:width="11.221cm" svg:height="6.321cm" svg:x="1.492cm" svg:y="5.748cm" presentation:class="outline" presentation:user-transformed="true">
          <draw:text-box>
            <text:list text:style-name="L3">
              <text:list-header>
                <text:p text:style-name="P16"><text:span text:style-name="T7">Firewall</text:span></text:p>
                <text:p text:style-name="P16"><text:span text:style-name="T7">SIEM</text:span></text:p>
                <text:p text:style-name="P16"><text:span text:style-name="T7">IDS/IPS</text:span></text:p>
                <text:p text:style-name="P16"><text:span text:style-name="T7">SOAR</text:span></text:p>
                <text:p text:style-name="P16"><text:span text:style-name="T7">WAF</text:span></text:p>
                <text:p text:style-name="P16"><text:span text:style-name="T7">VPN</text:span></text:p>
                <text:p text:style-name="P16"><text:span text:style-name="T7">etc...</text:span></text:p>
              </text:list-header>
            </text:list>
          </draw:text-box>
        </draw:frame>
        <draw:frame draw:name="PlaceHolder 23" presentation:style-name="pr11" draw:text-style-name="P17" draw:layer="layout" svg:width="11.225cm" svg:height="1.331cm" svg:x="12.701cm" svg:y="4.436cm" presentation:class="outline" presentation:user-transformed="true">
          <draw:text-box>
            <text:p text:style-name="P16"><text:span text:style-name="T6">Business Tech</text:span></text:p>
          </draw:text-box>
        </draw:frame>
        <draw:frame draw:name="PlaceHolder 24" presentation:style-name="pr12" draw:text-style-name="P17" draw:layer="layout" svg:width="11.225cm" svg:height="6.321cm" svg:x="12.701cm" svg:y="5.748cm" presentation:class="outline" presentation:user-transformed="true">
          <draw:text-box>
            <text:list text:style-name="L3">
              <text:list-header>
                <text:p text:style-name="P16"><text:span text:style-name="T7">AIM</text:span></text:p>
                <text:p text:style-name="P16"><text:span text:style-name="T7">DBs</text:span></text:p>
                <text:p text:style-name="P16"><text:span text:style-name="T7">Backup</text:span></text:p>
                <text:p text:style-name="P16"><text:span text:style-name="T7">Fileshare</text:span></text:p>
                <text:p text:style-name="P16"><text:span text:style-name="T7">WebApps</text:span></text:p>
                <text:p text:style-name="P16"><text:span text:style-name="T7">Auditing</text:span></text:p>
                <text:p text:style-name="P16"><text:span text:style-name="T7">etc...</text:span></text:p>
              </text:list-header>
            </text:list>
          </draw:text-box>
        </draw:frame>
        <presentation:notes draw:style-name="dp3">
          <draw:page-thumbnail draw:name="PlaceHolder 5" draw:style-name="gr2" draw:layer="layout" svg:width="15.238cm" svg:height="8.571cm" svg:x="1.905cm" svg:y="3.175cm" draw:page-number="4" presentation:class="page"/>
          <draw:frame draw:name="PlaceHolder 20" presentation:style-name="pr13" draw:text-style-name="P13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21" presentation:style-name="pr10" draw:text-style-name="P15" draw:layer="layout" svg:width="8.253cm" svg:height="1.272cm" svg:x="10.791cm" svg:y="24.126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Blank">
        <draw:frame draw:name="PlaceHolder 18" presentation:style-name="pr8" draw:text-style-name="P10" draw:layer="layout" svg:width="16.242cm" svg:height="2.013cm" svg:x="7.886cm" svg:y="1.253cm" presentation:class="title" presentation:user-transformed="true">
          <draw:text-box>
            <text:p text:style-name="P18"><text:span text:style-name="T8">More info can be found here:</text:span></text:p>
          </draw:text-box>
        </draw:frame>
        <draw:frame draw:name="PlaceHolder 19" presentation:style-name="pr14" draw:text-style-name="P19" draw:layer="layout" svg:width="22.786cm" svg:height="3.788cm" svg:x="0.714cm" svg:y="7cm" presentation:class="title" presentation:user-transformed="true">
          <draw:text-box>
            <text:p text:style-name="P9"><text:span text:style-name="T9">https://github.com/sreilly1977/dlh-cyber_security/blob/main/notes/Open-Source_Security_Stack.md</text:span></text:p>
          </draw:text-box>
        </draw:frame>
        <presentation:notes draw:style-name="dp1">
          <draw:page-thumbnail draw:name="PlaceHolder 15" draw:style-name="gr2" draw:layer="layout" svg:width="15.238cm" svg:height="8.571cm" svg:x="1.905cm" svg:y="3.175cm" draw:page-number="5" presentation:class="page"/>
          <draw:frame draw:name="PlaceHolder 16" presentation:style-name="pr15" draw:text-style-name="P13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17" presentation:style-name="pr10" draw:text-style-name="P15" draw:layer="layout" svg:width="8.253cm" svg:height="1.272cm" svg:x="10.791cm" svg:y="24.126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64000000384F55E27ED.jpg" xlink:type="simple" xlink:show="embed" xlink:actuate="onLoad"/>
    <draw:fill-image draw:name="msFillBitmap_20_10" draw:display-name="msFillBitmap 10" xlink:href="Pictures/1000000000000640000003847C7EC4DD.jpg" xlink:type="simple" xlink:show="embed" xlink:actuate="onLoad"/>
    <draw:fill-image draw:name="msFillBitmap_20_11" draw:display-name="msFillBitmap 11" xlink:href="Pictures/100000000000064000000384DD9B8BE4.jpg" xlink:type="simple" xlink:show="embed" xlink:actuate="onLoad"/>
    <draw:fill-image draw:name="msFillBitmap_20_12" draw:display-name="msFillBitmap 12" xlink:href="Pictures/100000000000064000000384DD9B8BE4.jpg" xlink:type="simple" xlink:show="embed" xlink:actuate="onLoad"/>
    <draw:fill-image draw:name="msFillBitmap_20_2" draw:display-name="msFillBitmap 2" xlink:href="Pictures/100000000000064000000384DD9B8BE4.jpg" xlink:type="simple" xlink:show="embed" xlink:actuate="onLoad"/>
    <draw:fill-image draw:name="msFillBitmap_20_3" draw:display-name="msFillBitmap 3" xlink:href="Pictures/100000000000064000000384DD9B8BE4.jpg" xlink:type="simple" xlink:show="embed" xlink:actuate="onLoad"/>
    <draw:fill-image draw:name="msFillBitmap_20_4" draw:display-name="msFillBitmap 4" xlink:href="Pictures/100000000000064000000384DD9B8BE4.jpg" xlink:type="simple" xlink:show="embed" xlink:actuate="onLoad"/>
    <draw:fill-image draw:name="msFillBitmap_20_5" draw:display-name="msFillBitmap 5" xlink:href="Pictures/100000000000064000000384F55E27ED.jpg" xlink:type="simple" xlink:show="embed" xlink:actuate="onLoad"/>
    <draw:fill-image draw:name="msFillBitmap_20_6" draw:display-name="msFillBitmap 6" xlink:href="Pictures/100000000000064000000384DD9B8BE4.jpg" xlink:type="simple" xlink:show="embed" xlink:actuate="onLoad"/>
    <draw:fill-image draw:name="msFillBitmap_20_7" draw:display-name="msFillBitmap 7" xlink:href="Pictures/100000000000064000000384DD9B8BE4.jpg" xlink:type="simple" xlink:show="embed" xlink:actuate="onLoad"/>
    <draw:fill-image draw:name="msFillBitmap_20_8" draw:display-name="msFillBitmap 8" xlink:href="Pictures/100000000000064000000384DD9B8BE4.jpg" xlink:type="simple" xlink:show="embed" xlink:actuate="onLoad"/>
    <draw:fill-image draw:name="msFillBitmap_20_9" draw:display-name="msFillBitmap 9" xlink:href="Pictures/100000000000064000000384DD9B8BE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mparison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•">
            <style:list-level-properties text:space-before="-0.9cm" text:min-label-width="0.9cm"/>
            <style:text-properties fo:font-family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omparison-outline2" style:family="presentation" style:parent-style-name="Comparison-outline1">
      <style:paragraph-properties fo:margin-left="0cm" fo:margin-right="0cm" fo:margin-top="0.141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Comparison-outline3" style:family="presentation" style:parent-style-name="Comparison-outline2">
      <style:paragraph-properties fo:margin-left="0cm" fo:margin-right="0cm" fo:margin-top="0.127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Comparison-outline4" style:family="presentation" style:parent-style-name="Comparison-outline3">
      <style:paragraph-properties fo:margin-left="0cm" fo:margin-right="0cm" fo:margin-top="0.113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113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itle_20_Only-background" style:display-name="Title Onl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with_20_Caption-background" style:display-name="Content with Capti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number text:level="1" style:num-format="">
            <style:list-level-properties text:space-before="-0.9cm" text:min-label-width="0.9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background" style:display-name="Title Slide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•">
            <style:list-level-properties text:space-before="-0.9cm" text:min-label-width="0.9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number text:level="1" style:num-format="">
            <style:list-level-properties text:space-before="-0.9cm" text:min-label-width="0.9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•">
            <style:list-level-properties text:space-before="-0.9cm" text:min-label-width="0.9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•">
            <style:list-level-properties text:space-before="-0.9cm" text:min-label-width="0.9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•">
            <style:list-level-properties text:space-before="-0.9cm" text:min-label-width="0.9cm"/>
            <style:text-properties fo:font-family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>
        <text:list-style style:name="_31__5f_Title_20_and_20_Content-outline1" style:display-name="1_Title and Content-outline1">
          <text:list-level-style-bullet text:level="1" text:bullet-char="•">
            <style:list-level-properties text:space-before="-0.9cm" text:min-label-width="0.9cm"/>
            <style:text-properties fo:font-family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40pt" fo:letter-spacing="normal" fo:language="en" fo:country="US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Noto Sans Devanagari" style:font-family-complex="'Noto Sans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•">
            <style:list-level-properties text:space-before="-0.9cm" text:min-label-width="0.9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27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27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Title_20_Slide-background" style:display-name="1_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 style:writing-mode="lr-tb">
        <text:list-style style:name="_31__5f_Title_20_Slide-outline1" style:display-name="1_Title Slide-outline1">
          <text:list-level-style-bullet text:level="1" text:bullet-char="•">
            <style:list-level-properties text:min-label-width="0.95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Slide-outline2" style:display-name="1_Title Slide-outline2" style:family="presentation" style:parent-style-name="_31__5f_Title_20_Slide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3" style:display-name="1_Title Slide-outline3" style:family="presentation" style:parent-style-name="_31__5f_Title_20_Slide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4" style:display-name="1_Title Slide-outline4" style:family="presentation" style:parent-style-name="_31__5f_Title_20_Slide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5" style:display-name="1_Title Slide-outline5" style:family="presentation" style:parent-style-name="_31__5f_Title_20_Slide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 style:writing-mode="lr-tb">
        <text:list-style style:name="_31__5f_Title_20_Slide-subtitle" style:display-name="1_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righ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family="Calibri" fo:font-size="28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title" style:display-name="1_Title Slide-title" style:family="presentation">
      <style:graphic-properties draw:stroke="none" draw:fill="none" draw:textarea-vertical-align="middle" style:writing-mode="lr-tb">
        <text:list-style style:name="_31__5f_Title_20_Slide-title" style:display-name="1_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right" fo:text-indent="0cm" style:punctuation-wrap="hanging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 loext:decorative="false"/>
      <style:paragraph-properties style:writing-mode="lr-tb"/>
    </style:style>
    <style:style style:name="Mpr20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3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36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37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_31__5f_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_31__5f_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_31__5f_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_31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_31__5f_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 loext:decorative="false"/>
      <style:paragraph-properties style:writing-mode="lr-tb"/>
    </style:style>
    <style:style style:name="Mpr61" style:family="presentation" style:parent-style-name="_31__5f_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_31__5f_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_31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left" fo:text-indent="0cm" loext:tab-stop-distance="2.54cm">
        <style:tab-stops/>
      </style:paragraph-properties>
      <style:text-properties fo:font-size="18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left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left" style:font-independent-line-spacing="true"/>
      <style:text-properties fo:font-size="36pt"/>
    </style:style>
    <style:style style:name="MP9" style:family="paragraph">
      <style:paragraph-properties fo:margin-left="0cm" fo:margin-right="0cm" fo:margin-top="0.169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MP11" style:family="paragraph">
      <style:paragraph-properties fo:margin-left="0cm" fo:margin-right="0cm" fo:margin-top="0.141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.127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113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5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21" style:family="paragraph"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left" style:font-independent-line-spacing="true"/>
      <style:text-properties fo:font-size="20pt"/>
    </style:style>
    <style:style style:name="MP23" style:family="paragraph">
      <style:paragraph-properties fo:margin-left="0cm" fo:margin-right="0cm" fo:margin-top="0.226cm" fo:margin-bottom="0cm" fo:line-height="100%" fo:text-align="left" fo:text-indent="0cm" loext:tab-stop-distance="2.54cm">
        <style:tab-stops/>
      </style:paragraph-properties>
    </style:style>
    <style:style style:name="MP24" style:family="paragraph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</style:style>
    <style:style style:name="MP25" style:family="paragraph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</style:style>
    <style:style style:name="MP26" style:family="paragraph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</style:style>
    <style:style style:name="MP27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28" style:family="paragraph">
      <style:paragraph-properties fo:margin-left="0cm" fo:margin-right="0cm" fo:margin-top="0.099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29" style:family="paragraph">
      <loext:graphic-properties draw:fill="none"/>
      <style:paragraph-properties fo:text-align="left" style:font-independent-line-spacing="true"/>
      <style:text-properties fo:font-size="14pt"/>
    </style:style>
    <style:style style:name="MP30" style:family="paragraph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</style:style>
    <style:style style:name="MP31" style:family="paragraph">
      <style:paragraph-properties fo:margin-left="0cm" fo:margin-right="0cm" fo:margin-top="0.198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32" style:family="paragraph">
      <style:paragraph-properties fo:margin-left="0cm" fo:margin-right="0cm" fo:margin-top="0.169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33" style:family="paragraph">
      <style:paragraph-properties fo:margin-left="0cm" fo:margin-right="0cm" fo:margin-top="0.141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34" style:family="paragraph">
      <style:paragraph-properties fo:margin-left="0cm" fo:margin-right="0cm" fo:margin-top="0.1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35" style:family="paragraph">
      <loext:graphic-properties draw:fill="none"/>
      <style:paragraph-properties fo:text-align="left"/>
      <style:text-properties fo:font-size="18pt"/>
    </style:style>
    <style:style style:name="MP36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37" style:family="paragraph">
      <loext:graphic-properties draw:fill="none"/>
      <style:paragraph-properties fo:text-align="left" style:font-independent-line-spacing="true"/>
      <style:text-properties fo:font-size="40pt"/>
    </style:style>
    <style:style style:name="MP38" style:family="paragraph">
      <style:paragraph-properties fo:margin-left="0cm" fo:margin-right="0cm" fo:margin-top="0.127cm" fo:margin-bottom="0cm" fo:line-height="100%" fo:text-align="left" fo:text-indent="0cm" loext:tab-stop-distance="2.54cm">
        <style:tab-stops/>
      </style:paragraph-properties>
    </style:style>
    <style:style style:name="MP39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40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41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42" style:family="paragraph">
      <style:paragraph-properties fo:margin-left="0cm" fo:margin-right="0cm" fo:margin-top="0.198cm" fo:margin-bottom="0cm" fo:line-height="100%" fo:text-align="righ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43" style:family="paragraph">
      <loext:graphic-properties draw:fill="none" draw:fill-color="#ffffff"/>
      <style:paragraph-properties fo:text-align="left" style:font-independent-line-spacing="true"/>
      <style:text-properties fo:font-size="28pt"/>
    </style:style>
    <style:style style:name="MP44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45" style:family="paragraph">
      <style:paragraph-properties fo:text-align="center"/>
      <style:text-properties fo:font-size="12pt" style:font-size-asian="14pt" style:font-size-complex="14pt"/>
    </style:style>
    <style:style style:name="MP46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4pt" fo:letter-spacing="normal" fo:language="en" fo:country="I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MT19" style:family="text"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20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2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23" style:family="text"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-0.9cm" text:min-label-width="0.9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-0.9cm" text:min-label-width="0.9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9">
      <text:list-level-style-bullet text:level="1" text:bullet-char="●">
        <style:list-level-properties text:min-label-width="0.6cm"/>
        <style:text-properties fo:font-family="OpenSymbol" fo:color="#a6a6a6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3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8" draw:layer="backgroundobjects" svg:width="22.48cm" svg:height="2.119cm" svg:x="1.48cm" svg:y="1.123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PlaceHolder 2" presentation:style-name="Mpr2" draw:text-style-name="MP10" draw:layer="backgroundobjects" svg:width="11.221cm" svg:height="1.331cm" svg:x="1.491cm" svg:y="4.435cm" presentation:class="outline" presentation:user-transformed="true">
        <draw:text-box>
          <text:list text:style-name="ML4">
            <text:list-item>
              <text:p text:style-name="MP9"><text:span text:style-name="MT4">Click to edit Master text styles</text:span></text:p>
            </text:list-item>
          </text:list>
        </draw:text-box>
      </draw:frame>
      <draw:frame draw:name="PlaceHolder 3" presentation:style-name="Mpr3" draw:text-style-name="MP10" draw:layer="backgroundobjects" svg:width="11.221cm" svg:height="6.321cm" svg:x="1.491cm" svg:y="5.747cm" presentation:class="outline" presentation:user-transformed="true">
        <draw:text-box>
          <text:list text:style-name="ML5">
            <text:list-item>
              <text:p text:style-name="MP9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2" draw:text-style-name="MP10" draw:layer="backgroundobjects" svg:width="11.225cm" svg:height="1.331cm" svg:x="12.7cm" svg:y="4.435cm" presentation:class="outline" presentation:user-transformed="true">
        <draw:text-box>
          <text:p text:style-name="MP9"><text:span text:style-name="MT4">Click to edit Master text styles</text:span></text:p>
        </draw:text-box>
      </draw:frame>
      <draw:frame draw:name="PlaceHolder 5" presentation:style-name="Mpr3" draw:text-style-name="MP10" draw:layer="backgroundobjects" svg:width="11.225cm" svg:height="6.321cm" svg:x="12.7cm" svg:y="5.747cm" presentation:class="outline" presentation:user-transformed="true">
        <draw:text-box>
          <text:list text:style-name="ML5">
            <text:list-item>
              <text:p text:style-name="MP9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4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7" presentation:style-name="Mpr4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8" presentation:style-name="Mpr4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19.798cm" svg:height="11.136cm" svg:x="0.6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4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7" draw:text-style-name="MP20" draw:layer="backgroundobjects" svg:width="22.858cm" svg:height="2.379cm" svg:x="1.27cm" svg:y="0.572cm" presentation:class="title" presentation:user-transformed="true">
        <draw:text-box>
          <text:p text:style-name="MP19"><text:span text:style-name="MT11">Click to edit Master title style</text:span></text:p>
        </draw:text-box>
      </draw:frame>
      <draw:frame draw:name="PlaceHolder 2" presentation:style-name="Mpr8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3" presentation:style-name="Mpr8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4" presentation:style-name="Mpr8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5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1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2" presentation:style-name="Mpr11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3" presentation:style-name="Mpr11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4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6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4" draw:text-style-name="MP22" draw:layer="backgroundobjects" svg:width="8.354cm" svg:height="2.419cm" svg:x="1.27cm" svg:y="0.569cm" presentation:class="title" presentation:user-transformed="true">
        <draw:text-box>
          <text:p text:style-name="MP21"><text:span text:style-name="MT12">Click to edit Master title style</text:span></text:p>
        </draw:text-box>
      </draw:frame>
      <draw:frame draw:name="PlaceHolder 2" presentation:style-name="Mpr15" draw:text-style-name="MP27" draw:layer="backgroundobjects" svg:width="14.197cm" svg:height="12.192cm" svg:x="9.931cm" svg:y="0.569cm" presentation:class="outline" presentation:user-transformed="true">
        <draw:text-box>
          <text:list text:style-name="ML11">
            <text:list-item>
              <text:p text:style-name="MP23"><text:span text:style-name="MT13">Click to 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5"><text:span text:style-name="MT15">Third level</text:span></text:p>
                      <text:list>
                        <text:list-item>
                          <text:p text:style-name="MP26"><text:span text:style-name="MT16">Fourth level</text:span></text:p>
                          <text:list>
                            <text:list-item>
                              <text:p text:style-name="MP26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5" draw:text-style-name="MP29" draw:layer="backgroundobjects" svg:width="8.354cm" svg:height="9.771cm" svg:x="1.27cm" svg:y="2.99cm" presentation:class="outline" presentation:user-transformed="true">
        <draw:text-box>
          <text:p text:style-name="MP28"><text:span text:style-name="MT17">Click to edit Master text styles</text:span></text:p>
        </draw:text-box>
      </draw:frame>
      <draw:frame draw:name="PlaceHolder 4" presentation:style-name="Mpr16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5" presentation:style-name="Mpr16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6" presentation:style-name="Mpr16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5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7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9" draw:text-style-name="MP8" draw:layer="backgroundobjects" svg:width="22.192cm" svg:height="4.566cm" svg:x="0.994cm" svg:y="4.322cm" presentation:class="title" presentation:user-transformed="true">
        <draw:text-box>
          <text:p text:style-name="MP7"><text:span text:style-name="MT3">Click to edit </text:span><text:span text:style-name="MT3"><text:line-break/></text:span><text:span text:style-name="MT3">Master title style</text:span></text:p>
        </draw:text-box>
      </draw:frame>
      <draw:frame draw:name="PlaceHolder 2" presentation:style-name="Mpr20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3" presentation:style-name="Mpr20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4" presentation:style-name="Mpr20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frame draw:name="PlaceHolder 5" presentation:style-name="Mpr21" draw:text-style-name="MP27" draw:layer="backgroundobjects" svg:width="22.858cm" svg:height="8.285cm" svg:x="1.27cm" svg:y="3.343cm" presentation:class="outline" presentation:user-transformed="true">
        <draw:text-box>
          <text:list text:style-name="ML12">
            <text:list-item>
              <text:p text:style-name="MP23"><text:span text:style-name="MT13">Click to edit the outline text format</text:span></text:p>
              <text:list>
                <text:list-item>
                  <text:p text:style-name="MP24"><text:span text:style-name="MT14">Second Outline Level</text:span></text:p>
                  <text:list>
                    <text:list-item>
                      <text:p text:style-name="MP25"><text:span text:style-name="MT15">Third Outline Level</text:span></text:p>
                      <text:list>
                        <text:list-item>
                          <text:p text:style-name="MP26"><text:span text:style-name="MT16">Fourth Outline Level</text:span></text:p>
                          <text:list>
                            <text:list-item>
                              <text:p text:style-name="MP26"><text:span text:style-name="MT16">Fifth Outline Level</text:span></text:p>
                              <text:list>
                                <text:list-item>
                                  <text:p text:style-name="MP30"><text:span text:style-name="MT16">Sixth Outline Level</text:span></text:p>
                                  <text:list>
                                    <text:list-item>
                                      <text:p text:style-name="MP30"><text:span text:style-name="MT1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-title" draw:layer="backgroundobjects" svg:width="0.001cm" svg:height="0.001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8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4" draw:text-style-name="MP22" draw:layer="backgroundobjects" svg:width="15.238cm" svg:height="1.179cm" svg:x="4.979cm" svg:y="10.001cm" presentation:class="title" presentation:user-transformed="true">
        <draw:text-box>
          <text:p text:style-name="MP21"><text:span text:style-name="MT12">Click to edit Master title style</text:span></text:p>
        </draw:text-box>
      </draw:frame>
      <draw:frame draw:name="PlaceHolder 2" presentation:style-name="Mpr25" draw:text-style-name="MP27" draw:layer="backgroundobjects" svg:width="15.238cm" svg:height="8.571cm" svg:x="4.979cm" svg:y="1.277cm" presentation:class="outline" presentation:user-transformed="true">
        <draw:text-box>
          <text:list text:style-name="ML11">
            <text:list-item>
              <text:p text:style-name="MP28"><text:span text:style-name="MT13">Click to edit the outline text format</text:span></text:p>
              <text:list>
                <text:list-item>
                  <text:p text:style-name="MP31"><text:span text:style-name="MT13">Second Outline Level</text:span></text:p>
                  <text:list>
                    <text:list-item>
                      <text:p text:style-name="MP32"><text:span text:style-name="MT13">Third Outline Level</text:span></text:p>
                      <text:list>
                        <text:list-item>
                          <text:p text:style-name="MP33"><text:span text:style-name="MT13">Fourth Outline Level</text:span></text:p>
                          <text:list>
                            <text:list-item>
                              <text:p text:style-name="MP33"><text:span text:style-name="MT13">Fifth Outline Level</text:span></text:p>
                              <text:list>
                                <text:list-item>
                                  <text:p text:style-name="MP34"><text:span text:style-name="MT13">Sixth Outline Level</text:span></text:p>
                                  <text:list>
                                    <text:list-item>
                                      <text:p text:style-name="MP34"><text:span text:style-name="MT1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6" draw:text-style-name="MP29" draw:layer="backgroundobjects" svg:width="15.238cm" svg:height="1.675cm" svg:x="4.979cm" svg:y="11.182cm" presentation:class="outline" presentation:user-transformed="true">
        <draw:text-box>
          <text:p text:style-name="MP28"><text:span text:style-name="MT17">Click to edit Master text styles</text:span></text:p>
        </draw:text-box>
      </draw:frame>
      <draw:frame draw:name="PlaceHolder 4" presentation:style-name="Mpr27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5" presentation:style-name="Mpr27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6" presentation:style-name="Mpr27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7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9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30" draw:text-style-name="MP20" draw:layer="backgroundobjects" svg:width="22.858cm" svg:height="2.379cm" svg:x="1.27cm" svg:y="0.572cm" presentation:class="title" presentation:user-transformed="true">
        <draw:text-box>
          <text:p text:style-name="MP19"><text:span text:style-name="MT11">Click to edit Master title style</text:span></text:p>
        </draw:text-box>
      </draw:frame>
      <draw:frame draw:name="PlaceHolder 2" presentation:style-name="Mpr31" draw:text-style-name="MP27" draw:layer="backgroundobjects" svg:width="22.858cm" svg:height="9.427cm" svg:x="1.27cm" svg:y="3.334cm" presentation:class="outline" presentation:user-transformed="true">
        <draw:text-box>
          <text:list text:style-name="ML12">
            <text:list-item>
              <text:p text:style-name="MP23"><text:span text:style-name="MT13">Click to 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5"><text:span text:style-name="MT15">Third level</text:span></text:p>
                      <text:list>
                        <text:list-item>
                          <text:p text:style-name="MP26"><text:span text:style-name="MT16">Fourth level</text:span></text:p>
                          <text:list>
                            <text:list-item>
                              <text:p text:style-name="MP26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2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4" presentation:style-name="Mpr32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5" presentation:style-name="Mpr32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8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0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35" draw:text-style-name="MP20" draw:layer="backgroundobjects" svg:width="5.713cm" svg:height="12.189cm" svg:x="18.415cm" svg:y="0.572cm" presentation:class="title" presentation:user-transformed="true">
        <draw:text-box>
          <text:p text:style-name="MP19"><text:span text:style-name="MT11">Click to edit Master title style</text:span></text:p>
        </draw:text-box>
      </draw:frame>
      <draw:frame draw:name="PlaceHolder 2" presentation:style-name="Mpr36" draw:text-style-name="MP27" draw:layer="backgroundobjects" svg:width="16.72cm" svg:height="12.189cm" svg:x="1.27cm" svg:y="0.572cm" presentation:class="outline" presentation:user-transformed="true">
        <draw:text-box>
          <text:list text:style-name="ML12">
            <text:list-item>
              <text:p text:style-name="MP23"><text:span text:style-name="MT13">Click to 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5"><text:span text:style-name="MT15">Third level</text:span></text:p>
                      <text:list>
                        <text:list-item>
                          <text:p text:style-name="MP26"><text:span text:style-name="MT16">Fourth level</text:span></text:p>
                          <text:list>
                            <text:list-item>
                              <text:p text:style-name="MP26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7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4" presentation:style-name="Mpr37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5" presentation:style-name="Mpr37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frame draw:name="Picture 6" draw:style-name="Mgr11" draw:text-style-name="MP35" draw:layer="backgroundobjects" svg:width="4.064cm" svg:height="1.462cm" svg:x="10.579cm" svg:y="6.462cm">
        <draw:image xlink:href="Pictures/100000010000012C0000006C69D056BB.png" xlink:type="simple" xlink:show="embed" xlink:actuate="onLoad" draw:mime-type="image/png">
          <text:p/>
        </draw:image>
        <svg:desc>E:\websites\free-power-point-templates\2012\logos.png</svg:desc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9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2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0" draw:text-style-name="MP8" draw:layer="backgroundobjects" svg:width="22.904cm" svg:height="2.119cm" svg:x="1.227cm" svg:y="0.971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PlaceHolder 2" presentation:style-name="Mpr41" draw:text-style-name="MP36" draw:layer="backgroundobjects" svg:width="22.904cm" svg:height="8.67cm" svg:x="1.186cm" svg:y="3.933cm" presentation:class="outline" presentation:user-transformed="true">
        <draw:text-box>
          <text:list text:style-name="ML4">
            <text:list-item>
              <text:p text:style-name="MP24"><text:span text:style-name="MT18">Click to edit Master text styles</text:span></text:p>
              <text:list>
                <text:list-item>
                  <text:p text:style-name="MP24"><text:span text:style-name="MT18">Second level</text:span></text:p>
                  <text:list>
                    <text:list-item>
                      <text:p text:style-name="MP25"><text:span text:style-name="MT5">Third level</text:span></text:p>
                      <text:list>
                        <text:list-item>
                          <text:p text:style-name="MP26"><text:span text:style-name="MT6">Fourth level</text:span></text:p>
                          <text:list>
                            <text:list-item>
                              <text:p text:style-name="MP2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2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4" presentation:style-name="Mpr42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5" presentation:style-name="Mpr42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10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3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5" draw:text-style-name="MP8" draw:layer="backgroundobjects" svg:width="16.242cm" svg:height="2.013cm" svg:x="7.886cm" svg:y="1.252cm" presentation:class="title" presentation:user-transformed="true">
        <draw:text-box>
          <text:p text:style-name="MP21"><text:span text:style-name="MT19">Click to edit Master title style</text:span></text:p>
        </draw:text-box>
      </draw:frame>
      <draw:frame draw:name="PlaceHolder 2" presentation:style-name="Mpr46" draw:text-style-name="MP36" draw:layer="backgroundobjects" svg:width="16.242cm" svg:height="9.751cm" svg:x="7.886cm" svg:y="3.373cm" presentation:class="outline" presentation:user-transformed="true">
        <draw:text-box>
          <text:list text:style-name="ML4">
            <text:list-item>
              <text:p text:style-name="MP24"><text:span text:style-name="MT18">Click to edit Master text styles</text:span></text:p>
              <text:list>
                <text:list-item>
                  <text:p text:style-name="MP24"><text:span text:style-name="MT18">Second level</text:span></text:p>
                  <text:list>
                    <text:list-item>
                      <text:p text:style-name="MP25"><text:span text:style-name="MT5">Third level</text:span></text:p>
                      <text:list>
                        <text:list-item>
                          <text:p text:style-name="MP26"><text:span text:style-name="MT6">Fourth level</text:span></text:p>
                          <text:list>
                            <text:list-item>
                              <text:p text:style-name="MP2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7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4" presentation:style-name="Mpr47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5" presentation:style-name="Mpr47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_31__5f_Title_20_and_20_Content-title" draw:layer="backgroundobjects" svg:width="0.001cm" svg:height="0.001cm" svg:x="0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4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0" draw:text-style-name="MP37" draw:layer="backgroundobjects" svg:width="21.588cm" svg:height="2.836cm" svg:x="2.006cm" svg:y="9.181cm" presentation:class="title" presentation:user-transformed="true">
        <draw:text-box>
          <text:p text:style-name="MP21"><text:span text:style-name="MT20">Click to edit Master title style</text:span></text:p>
        </draw:text-box>
      </draw:frame>
      <draw:frame draw:name="PlaceHolder 2" presentation:style-name="Mpr51" draw:text-style-name="MP22" draw:layer="backgroundobjects" svg:width="21.588cm" svg:height="3.123cm" svg:x="2.006cm" svg:y="6.056cm" presentation:class="outline" presentation:user-transformed="true">
        <draw:text-box>
          <text:list text:style-name="ML13">
            <text:list-item>
              <text:p text:style-name="MP33"><text:span text:style-name="MT21">Click to edit Master text styles</text:span></text:p>
            </text:list-item>
          </text:list>
        </draw:text-box>
      </draw:frame>
      <draw:frame draw:name="PlaceHolder 3" presentation:style-name="Mpr52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4" presentation:style-name="Mpr52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5" presentation:style-name="Mpr52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5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5" draw:text-style-name="MP20" draw:layer="backgroundobjects" svg:width="22.858cm" svg:height="2.379cm" svg:x="1.27cm" svg:y="0.572cm" presentation:class="title" presentation:user-transformed="true">
        <draw:text-box>
          <text:p text:style-name="MP19"><text:span text:style-name="MT11">Click to edit Master title style</text:span></text:p>
        </draw:text-box>
      </draw:frame>
      <draw:frame draw:name="PlaceHolder 2" presentation:style-name="Mpr56" draw:text-style-name="MP36" draw:layer="backgroundobjects" svg:width="11.216cm" svg:height="9.427cm" svg:x="1.27cm" svg:y="3.334cm" presentation:class="outline" presentation:user-transformed="true">
        <draw:text-box>
          <text:list text:style-name="ML12">
            <text:list-item>
              <text:p text:style-name="MP24"><text:span text:style-name="MT14">Click to edit Master text styles</text:span></text:p>
              <text:list>
                <text:list-item>
                  <text:p text:style-name="MP25"><text:span text:style-name="MT15">Second level</text:span></text:p>
                  <text:list>
                    <text:list-item>
                      <text:p text:style-name="MP26"><text:span text:style-name="MT16">Third level</text:span></text:p>
                      <text:list>
                        <text:list-item>
                          <text:p text:style-name="MP38"><text:span text:style-name="MT22">Fourth level</text:span></text:p>
                          <text:list>
                            <text:list-item>
                              <text:p text:style-name="MP38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56" draw:text-style-name="MP36" draw:layer="backgroundobjects" svg:width="11.216cm" svg:height="9.427cm" svg:x="12.912cm" svg:y="3.334cm" presentation:class="outline" presentation:user-transformed="true">
        <draw:text-box>
          <text:list text:style-name="ML14">
            <text:list-item>
              <text:p text:style-name="MP24"><text:span text:style-name="MT14">Click to edit Master text styles</text:span></text:p>
            </text:list-item>
          </text:list>
          <text:list text:style-name="ML15">
            <text:list-item>
              <text:list>
                <text:list-item>
                  <text:p text:style-name="MP25"><text:span text:style-name="MT15">Second level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6"><text:span text:style-name="MT16">Third level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8"><text:span text:style-name="MT2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8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57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5" presentation:style-name="Mpr57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6" presentation:style-name="Mpr57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6" draw:text-style-name="MP40" draw:layer="backgroundobjects" svg:width="23.304cm" svg:height="1.437cm" svg:x="-0.025cm" svg:y="14.483cm">
        <text:p text:style-name="MP39"><text:span text:style-name="MT2">This presentation uses a free template provided by FPPT.com</text:span></text:p>
        <text:p text:style-name="MP39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0" draw:text-style-name="MP8" draw:layer="backgroundobjects" svg:width="22.193cm" svg:height="4.567cm" svg:x="0.994cm" svg:y="4.322cm" presentation:class="title" presentation:user-transformed="true">
        <draw:text-box>
          <text:p text:style-name="MP41"><text:span text:style-name="MT3">Click to edit </text:span><text:span text:style-name="MT3"><text:line-break/></text:span><text:span text:style-name="MT3">Master title style</text:span></text:p>
        </draw:text-box>
      </draw:frame>
      <draw:frame draw:name="Subtitle 2" presentation:style-name="Mpr61" draw:text-style-name="MP43" draw:layer="backgroundobjects" svg:width="22.153cm" svg:height="1.904cm" svg:x="-0.276cm" svg:y="9.935cm" presentation:class="subtitle" presentation:user-transformed="true">
        <draw:text-box>
          <text:p text:style-name="MP42"><text:span text:style-name="MT23">Click to edit Master subtitle style</text:span></text:p>
        </draw:text-box>
      </draw:frame>
      <draw:frame draw:name="Date Placeholder 3" presentation:style-name="Mpr62" draw:text-style-name="MP15" draw:layer="backgroundobjects" svg:width="5.926cm" svg:height="0.76cm" svg:x="1.27cm" svg:y="13.242cm" presentation:class="date-time" presentation:user-transformed="true">
        <draw:text-box>
          <text:p text:style-name="MP44"><text:span text:style-name="MT9"><presentation:date-time/></text:span></text:p>
        </draw:text-box>
      </draw:frame>
      <draw:frame draw:name="Footer Placeholder 4" presentation:style-name="Mpr62" draw:text-style-name="MP15" draw:layer="backgroundobjects" svg:width="8.042cm" svg:height="0.76cm" svg:x="8.678cm" svg:y="13.242cm" presentation:class="footer" presentation:user-transformed="true">
        <draw:text-box>
          <text:p text:style-name="MP45"><text:span text:style-name="MT1"><presentation:footer/></text:span></text:p>
        </draw:text-box>
      </draw:frame>
      <draw:frame draw:name="Slide Number Placeholder 5" presentation:style-name="Mpr62" draw:text-style-name="MP15" draw:layer="backgroundobjects" svg:width="5.926cm" svg:height="0.76cm" svg:x="18.203cm" svg:y="13.242cm" presentation:class="page-number" presentation:user-transformed="true">
        <draw:text-box>
          <text:p text:style-name="MP46"><text:span text:style-name="MT9"><text:page-number>&lt;number&gt;</text:page-number></text:span></text:p>
        </draw:text-box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9.798cm" svg:height="11.136cm" svg:x="0.6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8-01T15:40:51</meta:creation-date>
    <dc:language>en-IE</dc:language>
    <dc:date>2026-07-15T21:02:36.042159926</dc:date>
    <meta:editing-cycles>12</meta:editing-cycles>
    <meta:editing-duration>PT33M23S</meta:editing-duration>
    <meta:generator>LibreOffice/26.2.4.2$Linux_X86_64 LibreOffice_project/64a984c51f4702dbd3710b13428c673a2f1292e7</meta:generator>
    <meta:document-statistic meta:object-count="202"/>
    <meta:user-defined meta:name="AppVersion">15.0000</meta:user-defined>
    <meta:user-defined meta:name="Notes" meta:value-type="float">1</meta:user-defined>
    <meta:user-defined meta:name="PresentationFormat">On-screen Show (16:9)</meta:user-defined>
    <meta:user-defined meta:name="Slides" meta:value-type="float">5</meta:user-defined>
  </office:meta>
</office:document-meta>
</file>