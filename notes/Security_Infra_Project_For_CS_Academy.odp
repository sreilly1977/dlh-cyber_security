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BE000001A032831821.png" manifest:media-type="image/png"/>
  <manifest:file-entry manifest:full-path="Pictures/10000001000000AD00000077058DDA17.png" manifest:media-type="image/png"/>
  <manifest:file-entry manifest:full-path="Pictures/100000010000012C0000006C69D056BB.png" manifest:media-type="image/png"/>
  <manifest:file-entry manifest:full-path="Pictures/100000000000064000000384DD9B8BE4.jpg" manifest:media-type="image/jpeg"/>
  <manifest:file-entry manifest:full-path="Pictures/1000000100000424000004241E48035B.png" manifest:media-type="image/png"/>
  <manifest:file-entry manifest:full-path="Pictures/1000000000000640000003847C7EC4DD.jpg" manifest:media-type="image/jpeg"/>
  <manifest:file-entry manifest:full-path="Pictures/100000000000064000000384F55E27E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_31__5f_Title_20_Slide-title">
      <style:graphic-properties draw:stroke="none" svg:stroke-width="0cm" draw:fill="none" loext:fill-use-slide-background="false" draw:textarea-horizontal-align="right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loext:fill-use-slide-background="false" draw:textarea-horizontal-align="right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_31__5f_Title_20_Slide-subtitle">
      <style:graphic-properties draw:stroke="none" svg:stroke-width="0cm" draw:fill="none" draw:fill-color="#ffffff" loext:fill-use-slide-background="false" draw:textarea-horizontal-align="center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Blan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Comparison-notes">
      <style:graphic-properties draw:fill-color="#ffffff" draw:auto-grow-height="false" fo:min-height="13.365cm" loext:decorative="false"/>
      <style:paragraph-properties style:writing-mode="lr-tb"/>
    </style:style>
    <style:style style:name="pr15" style:family="presentation" style:parent-style-name="Blan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pr16" style:family="presentation" style:parent-style-name="Blank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right"/>
    </style:style>
    <style:style style:name="P2" style:family="paragraph">
      <loext:graphic-properties draw:fill="none"/>
      <style:paragraph-properties fo:text-align="center" style:font-independent-line-spacing="true"/>
      <style:text-properties style:text-outline="true" fo:font-size="36pt" fo:text-shadow="1pt 1pt" fo:background-color="transparent"/>
    </style:style>
    <style:style style:name="P3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style:text-outline="true" fo:text-shadow="1pt 1pt"/>
    </style:style>
    <style:style style:name="P10" style:family="paragraph">
      <loext:graphic-properties draw:fill="none"/>
      <style:paragraph-properties fo:text-align="left" style:font-independent-line-spacing="true"/>
      <style:text-properties style:text-outline="true" fo:font-size="36pt" fo:text-shadow="1pt 1pt"/>
    </style:style>
    <style:style style:name="P11" style:family="paragraph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</style:style>
    <style:style style:name="P12" style:family="paragraph">
      <loext:graphic-properties draw:fill="none"/>
      <style:paragraph-properties fo:text-align="left" style:font-independent-line-spacing="true"/>
      <style:text-properties fo:font-size="2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9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style:text-outline="true" fo:text-shadow="1pt 1pt"/>
    </style:style>
    <style:style style:name="P20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left" style:font-independent-line-spacing="true"/>
      <style:text-properties fo:font-size="36pt"/>
    </style:style>
    <style:style style:name="T1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name-asian="Noto Serif CJK SC" style:font-size-asian="36pt" style:font-style-asian="normal" style:font-weight-asian="normal" style:font-name-complex="Liberation Serif1" style:font-size-complex="3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18pt" fo:letter-spacing="normal" fo:language="en" fo:country="US" fo:font-style="normal" fo:text-shadow="1pt 1pt" style:text-underline-style="none" fo:font-weight="normal" fo:background-color="transparent" style:font-name-asian="Noto Serif CJK SC" style:font-size-asian="18pt" style:font-style-asian="normal" style:font-weight-asian="normal" style:font-name-complex="Liberation Serif1" style:font-size-complex="1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89b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89b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draw:frame draw:name="Title 1" presentation:style-name="pr1" draw:text-style-name="P2" draw:layer="layout" svg:width="22.787cm" svg:height="3.789cm" svg:x="0.564cm" svg:y="5.2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1">Security Infrastructure Lab</text:span></text:p>
                  </text:list-header>
                </text:list>
              </text:list-item>
            </text:list>
          </draw:text-box>
        </draw:frame>
        <draw:frame draw:name="Subtitle 1" presentation:style-name="pr2" draw:text-style-name="P4" draw:layer="layout" svg:width="21.303cm" svg:height="2.12cm" svg:x="1.197cm" svg:y="10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3"><text:span text:style-name="T1">Complete Virtual Environment</text:span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4.5cm" svg:height="3.096cm" svg:x="19cm" svg:y="0.5cm">
          <draw:image xlink:href="Pictures/10000001000000AD00000077058DDA17.png" xlink:type="simple" xlink:show="embed" xlink:actuate="onLoad" draw:mime-type="image/png">
            <text:p/>
          </draw:image>
        </draw:frame>
        <draw:frame draw:style-name="gr1" draw:text-style-name="P5" draw:layer="layout" svg:width="3cm" svg:height="3cm" svg:x="0.5cm" svg:y="0.5cm">
          <draw:image xlink:href="Pictures/1000000100000424000004241E48035B.png" xlink:type="simple" xlink:show="embed" xlink:actuate="onLoad" draw:mime-type="image/png">
            <text:p/>
          </draw:image>
        </draw:frame>
        <draw:frame draw:name="Subtitle 2" presentation:style-name="pr3" draw:text-style-name="P7" draw:layer="layout" svg:width="6.303cm" svg:height="1cm" svg:x="19cm" svg:y="12.5cm">
          <draw:text-box>
            <text:list text:style-name="L1">
              <text:list-item>
                <text:list>
                  <text:list-header>
                    <text:p text:style-name="P6"><text:span text:style-name="T2">Stephen Reill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laceHolder 1" presentation:style-name="pr5" draw:text-style-name="P10" draw:layer="layout" svg:width="22.904cm" svg:height="2.119cm" svg:x="1.227cm" svg:y="0.971cm" presentation:class="title" presentation:user-transformed="true">
          <draw:text-box>
            <text:p text:style-name="P9"><text:span text:style-name="T3">What is it?</text:span></text:p>
          </draw:text-box>
        </draw:frame>
        <draw:frame draw:name="PlaceHolder 2" presentation:style-name="pr6" draw:text-style-name="P12" draw:layer="layout" svg:width="22.904cm" svg:height="8.67cm" svg:x="1.186cm" svg:y="3.933cm" presentation:class="outline" presentation:user-transformed="true">
          <draw:text-box>
            <text:list text:style-name="L4">
              <text:list-item>
                <text:p text:style-name="P11"><text:span text:style-name="T4">It’s a completely virtualized network environment</text:span></text:p>
              </text:list-item>
              <text:list-item>
                <text:p text:style-name="P11"><text:span text:style-name="T4">Can be used to simulate most of a real world network (financial, medical, corporate...)</text:span></text:p>
              </text:list-item>
              <text:list-item>
                <text:p text:style-name="P11"><text:span text:style-name="T4">This includes a full security suite</text:span></text:p>
              </text:list-item>
              <text:list-item>
                <text:p text:style-name="P11"><text:span text:style-name="T4">We would have to build it, brick by brick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style-name="gr3" draw:text-style-name="P13" draw:layer="layout" svg:width="24.899cm" svg:height="4.72cm" svg:x="0.101cm" svg:y="6cm">
          <draw:image xlink:href="Pictures/10000001000008BE000001A032831821.png" xlink:type="simple" xlink:show="embed" xlink:actuate="onLoad" draw:mime-type="image/png">
            <text:p/>
          </draw:image>
        </draw:frame>
        <draw:frame draw:name="PlaceHolder 9" presentation:style-name="pr8" draw:text-style-name="P10" draw:layer="layout" svg:width="22.904cm" svg:height="2.119cm" svg:x="1.227cm" svg:y="0.972cm" presentation:class="title" presentation:user-transformed="true">
          <draw:text-box>
            <text:p text:style-name="P9"><text:span text:style-name="T3">An entire network in a box</text:span></text:p>
          </draw:text-box>
        </draw:frame>
        <presentation:notes draw:style-name="dp1">
          <draw:page-thumbnail draw:name="PlaceHolder 6" draw:style-name="gr2" draw:layer="layout" svg:width="15.238cm" svg:height="8.571cm" svg:x="1.905cm" svg:y="3.175cm" draw:page-number="3" presentation:class="page"/>
          <draw:frame draw:name="PlaceHolder 7" presentation:style-name="pr9" draw:text-style-name="P14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8" presentation:style-name="pr10" draw:text-style-name="P16" draw:layer="layout" svg:width="8.253cm" svg:height="1.272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Comparison">
        <draw:frame draw:name="PlaceHolder 10" presentation:style-name="pr11" draw:text-style-name="P10" draw:layer="layout" svg:width="22.48cm" svg:height="2.119cm" svg:x="1.48cm" svg:y="1.123cm" presentation:class="title" presentation:user-transformed="true">
          <draw:text-box>
            <text:p text:style-name="P9"><text:span text:style-name="T3">Some ideas on what to deploy</text:span></text:p>
          </draw:text-box>
        </draw:frame>
        <draw:frame draw:name="PlaceHolder 11" presentation:style-name="pr12" draw:text-style-name="P18" draw:layer="layout" svg:width="11.221cm" svg:height="1.331cm" svg:x="1.491cm" svg:y="4.435cm" presentation:class="outline" presentation:user-transformed="true">
          <draw:text-box>
            <text:p text:style-name="P17"><text:span text:style-name="T6">Security</text:span></text:p>
          </draw:text-box>
        </draw:frame>
        <draw:frame draw:name="PlaceHolder 12" presentation:style-name="pr13" draw:text-style-name="P18" draw:layer="layout" svg:width="11.221cm" svg:height="6.321cm" svg:x="1.491cm" svg:y="5.747cm" presentation:class="outline" presentation:user-transformed="true">
          <draw:text-box>
            <text:list text:style-name="L4">
              <text:list-header>
                <text:p text:style-name="P17"><text:span text:style-name="T7">Firewall</text:span></text:p>
                <text:p text:style-name="P17"><text:span text:style-name="T7">SIEM</text:span></text:p>
                <text:p text:style-name="P17"><text:span text:style-name="T7">IDS/IPS</text:span></text:p>
                <text:p text:style-name="P17"><text:span text:style-name="T7">SOAR</text:span></text:p>
                <text:p text:style-name="P17"><text:span text:style-name="T7">WAF</text:span></text:p>
                <text:p text:style-name="P17"><text:span text:style-name="T7">VPN</text:span></text:p>
                <text:p text:style-name="P17"><text:span text:style-name="T7">etc...</text:span></text:p>
              </text:list-header>
            </text:list>
          </draw:text-box>
        </draw:frame>
        <draw:frame draw:name="PlaceHolder 13" presentation:style-name="pr12" draw:text-style-name="P18" draw:layer="layout" svg:width="11.225cm" svg:height="1.331cm" svg:x="12.7cm" svg:y="4.435cm" presentation:class="outline" presentation:user-transformed="true">
          <draw:text-box>
            <text:p text:style-name="P17"><text:span text:style-name="T6">Business</text:span></text:p>
          </draw:text-box>
        </draw:frame>
        <draw:frame draw:name="PlaceHolder 14" presentation:style-name="pr13" draw:text-style-name="P18" draw:layer="layout" svg:width="11.225cm" svg:height="6.321cm" svg:x="12.7cm" svg:y="5.747cm" presentation:class="outline" presentation:user-transformed="true">
          <draw:text-box>
            <text:list text:style-name="L4">
              <text:list-header>
                <text:p text:style-name="P17"><text:span text:style-name="T7">AIM</text:span></text:p>
                <text:p text:style-name="P17"><text:span text:style-name="T7">Applications</text:span></text:p>
                <text:p text:style-name="P17"><text:span text:style-name="T7">Backup</text:span></text:p>
                <text:p text:style-name="P17"><text:span text:style-name="T7">Fileshare</text:span></text:p>
                <text:p text:style-name="P17"><text:span text:style-name="T7">Webfacing</text:span></text:p>
                <text:p text:style-name="P17"><text:span text:style-name="T7">Compliance</text:span></text:p>
                <text:p text:style-name="P17"><text:span text:style-name="T7">etc...</text:span></text:p>
              </text:list-header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frame draw:name="PlaceHolder 18" presentation:style-name="pr8" draw:text-style-name="P10" draw:layer="layout" svg:width="16.242cm" svg:height="2.013cm" svg:x="7.886cm" svg:y="1.253cm" presentation:class="title" presentation:user-transformed="true">
          <draw:text-box>
            <text:p text:style-name="P19"><text:span text:style-name="T8">More info can be found here:</text:span></text:p>
          </draw:text-box>
        </draw:frame>
        <draw:frame draw:name="PlaceHolder 19" presentation:style-name="pr15" draw:text-style-name="P21" draw:layer="layout" svg:width="22.786cm" svg:height="3.788cm" svg:x="0.714cm" svg:y="7cm" presentation:class="title" presentation:user-transformed="true">
          <draw:text-box>
            <text:p text:style-name="P20"><text:span text:style-name="T9">https://github.com/sreilly1977/dlh-cyber_security/blob/main/notes/Open-Source_Security_Stack.md</text:span></text:p>
          </draw:text-box>
        </draw:frame>
        <presentation:notes draw:style-name="dp1">
          <draw:page-thumbnail draw:name="PlaceHolder 15" draw:style-name="gr2" draw:layer="layout" svg:width="15.238cm" svg:height="8.571cm" svg:x="1.905cm" svg:y="3.175cm" draw:page-number="5" presentation:class="page"/>
          <draw:frame draw:name="PlaceHolder 16" presentation:style-name="pr16" draw:text-style-name="P14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17" presentation:style-name="pr10" draw:text-style-name="P16" draw:layer="layout" svg:width="8.253cm" svg:height="1.272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64000000384F55E27ED.jpg" xlink:type="simple" xlink:show="embed" xlink:actuate="onLoad"/>
    <draw:fill-image draw:name="msFillBitmap_20_10" draw:display-name="msFillBitmap 10" xlink:href="Pictures/1000000000000640000003847C7EC4DD.jpg" xlink:type="simple" xlink:show="embed" xlink:actuate="onLoad"/>
    <draw:fill-image draw:name="msFillBitmap_20_11" draw:display-name="msFillBitmap 11" xlink:href="Pictures/100000000000064000000384DD9B8BE4.jpg" xlink:type="simple" xlink:show="embed" xlink:actuate="onLoad"/>
    <draw:fill-image draw:name="msFillBitmap_20_12" draw:display-name="msFillBitmap 12" xlink:href="Pictures/100000000000064000000384DD9B8BE4.jpg" xlink:type="simple" xlink:show="embed" xlink:actuate="onLoad"/>
    <draw:fill-image draw:name="msFillBitmap_20_2" draw:display-name="msFillBitmap 2" xlink:href="Pictures/100000000000064000000384DD9B8BE4.jpg" xlink:type="simple" xlink:show="embed" xlink:actuate="onLoad"/>
    <draw:fill-image draw:name="msFillBitmap_20_3" draw:display-name="msFillBitmap 3" xlink:href="Pictures/100000000000064000000384DD9B8BE4.jpg" xlink:type="simple" xlink:show="embed" xlink:actuate="onLoad"/>
    <draw:fill-image draw:name="msFillBitmap_20_4" draw:display-name="msFillBitmap 4" xlink:href="Pictures/100000000000064000000384DD9B8BE4.jpg" xlink:type="simple" xlink:show="embed" xlink:actuate="onLoad"/>
    <draw:fill-image draw:name="msFillBitmap_20_5" draw:display-name="msFillBitmap 5" xlink:href="Pictures/100000000000064000000384F55E27ED.jpg" xlink:type="simple" xlink:show="embed" xlink:actuate="onLoad"/>
    <draw:fill-image draw:name="msFillBitmap_20_6" draw:display-name="msFillBitmap 6" xlink:href="Pictures/100000000000064000000384DD9B8BE4.jpg" xlink:type="simple" xlink:show="embed" xlink:actuate="onLoad"/>
    <draw:fill-image draw:name="msFillBitmap_20_7" draw:display-name="msFillBitmap 7" xlink:href="Pictures/100000000000064000000384DD9B8BE4.jpg" xlink:type="simple" xlink:show="embed" xlink:actuate="onLoad"/>
    <draw:fill-image draw:name="msFillBitmap_20_8" draw:display-name="msFillBitmap 8" xlink:href="Pictures/100000000000064000000384DD9B8BE4.jpg" xlink:type="simple" xlink:show="embed" xlink:actuate="onLoad"/>
    <draw:fill-image draw:name="msFillBitmap_20_9" draw:display-name="msFillBitmap 9" xlink:href="Pictures/100000000000064000000384DD9B8BE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mparison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omparison-outline2" style:family="presentation" style:parent-style-name="Comparison-outline1">
      <style:paragraph-properties fo:margin-left="0cm" fo:margin-right="0cm" fo:margin-top="0.141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Comparison-outline3" style:family="presentation" style:parent-style-name="Comparison-outline2">
      <style:paragraph-properties fo:margin-left="0cm" fo:margin-right="0cm" fo:margin-top="0.127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Comparison-outline4" style:family="presentation" style:parent-style-name="Comparison-outline3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•">
            <style:list-level-properties text:min-label-width="0.95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 style:writing-mode="lr-tb">
        <text:list-style style:name="_31__5f_Title_20_Slide-subtitle" style:display-name="1_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righ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style:punctuation-wrap="hanging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6" style:family="graphic" style:parent-style-name="standard" style:list-style-name="ML3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Mpr20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3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36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37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_31__5f_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_31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Mpr61" style:family="presentation" style:parent-style-name="_31__5f_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_31__5f_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_31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left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left" fo:text-indent="0cm" loext:tab-stop-distance="2.54cm" style:font-independent-line-spacing="true">
        <style:tab-stops/>
      </style:paragraph-properties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size="36pt"/>
    </style:style>
    <style:style style:name="MP8" style:family="paragraph">
      <loext:graphic-properties draw:fill="none"/>
      <style:paragraph-properties fo:text-align="left" style:font-independent-line-spacing="true"/>
      <style:text-properties fo:font-size="36pt"/>
    </style:style>
    <style:style style:name="MP9" style:family="paragraph"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24pt"/>
    </style:style>
    <style:style style:name="MP1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11" style:family="paragraph">
      <style:paragraph-properties fo:margin-left="0cm" fo:margin-right="0cm" fo:margin-top="0.141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24pt"/>
    </style:style>
    <style:style style:name="MP12" style:family="paragraph">
      <style:paragraph-properties fo:margin-left="0cm" fo:margin-right="0cm" fo:margin-top="0.127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24pt"/>
    </style:style>
    <style:style style:name="MP13" style:family="paragraph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24pt"/>
    </style:style>
    <style:style style:name="MP14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44pt"/>
    </style:style>
    <style:style style:name="MP20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21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20pt"/>
    </style:style>
    <style:style style:name="MP22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3" style:family="paragraph"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size="32pt"/>
    </style:style>
    <style:style style:name="MP24" style:family="paragraph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size="32pt"/>
    </style:style>
    <style:style style:name="MP25" style:family="paragraph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size="32pt"/>
    </style:style>
    <style:style style:name="MP26" style:family="paragraph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size="32pt"/>
    </style:style>
    <style:style style:name="MP2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8" style:family="paragraph"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14pt"/>
    </style:style>
    <style:style style:name="MP29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0" style:family="paragraph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size="32pt"/>
    </style:style>
    <style:style style:name="MP31" style:family="paragraph"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32pt"/>
    </style:style>
    <style:style style:name="MP32" style:family="paragraph">
      <style:paragraph-properties fo:margin-left="0cm" fo:margin-right="0cm" fo:margin-top="0.198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32pt"/>
    </style:style>
    <style:style style:name="MP33" style:family="paragraph">
      <style:paragraph-properties fo:margin-left="0cm" fo:margin-right="0cm" fo:margin-top="0.16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32pt"/>
    </style:style>
    <style:style style:name="MP34" style:family="paragraph">
      <style:paragraph-properties fo:margin-left="0cm" fo:margin-right="0cm" fo:margin-top="0.141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32pt"/>
    </style:style>
    <style:style style:name="MP35" style:family="paragraph">
      <style:paragraph-properties fo:margin-left="0cm" fo:margin-right="0cm" fo:margin-top="0.1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32pt"/>
    </style:style>
    <style:style style:name="MP36" style:family="paragraph">
      <loext:graphic-properties draw:fill="none"/>
      <style:paragraph-properties fo:text-align="left"/>
      <style:text-properties fo:font-size="18pt"/>
    </style:style>
    <style:style style:name="MP37" style:family="paragraph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size="28pt"/>
    </style:style>
    <style:style style:name="MP38" style:family="paragraph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size="28pt"/>
    </style:style>
    <style:style style:name="MP39" style:family="paragraph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size="28pt"/>
    </style:style>
    <style:style style:name="MP40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41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36pt"/>
    </style:style>
    <style:style style:name="MP42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40pt"/>
    </style:style>
    <style:style style:name="MP43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44" style:family="paragraph">
      <style:paragraph-properties fo:margin-left="0cm" fo:margin-right="0cm" fo:margin-top="0.141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20pt"/>
    </style:style>
    <style:style style:name="MP45" style:family="paragraph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  <style:text-properties fo:font-size="28pt"/>
    </style:style>
    <style:style style:name="MP46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4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48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49" style:family="paragraph">
      <style:paragraph-properties fo:margin-left="0cm" fo:margin-right="0cm" fo:margin-top="0.198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0" style:family="paragraph">
      <loext:graphic-properties draw:fill="none" draw:fill-color="#ffffff"/>
      <style:paragraph-properties fo:text-align="left" style:font-independent-line-spacing="true"/>
      <style:text-properties fo:font-size="28pt"/>
    </style:style>
    <style:style style:name="MP5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52" style:family="paragraph">
      <style:paragraph-properties fo:text-align="center"/>
      <style:text-properties fo:font-size="12pt" style:font-size-asian="14pt" style:font-size-complex="14pt"/>
    </style:style>
    <style:style style:name="MP53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en" fo:country="I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9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2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89b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-0.9cm" text:min-label-width="0.9cm"/>
        <style:text-properties fo:color="#f89b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0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1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ffffff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ffffff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ffffff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ffffff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ffffff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ffffff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ffffff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ffffff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ffffff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ffffff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7">
      <text:list-level-style-bullet text:level="1" text:bullet-char="•">
        <style:list-level-properties text:space-before="0.3cm" text:min-label-width="0.9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8">
      <text:list-level-style-bullet text:level="1" text:bullet-char="•">
        <style:list-level-properties text:space-before="0.3cm" text:min-label-width="0.9cm"/>
        <style:text-properties fo:font-family="Arial" fo:color="#000000" fo:font-size="100%"/>
      </text:list-level-style-bullet>
      <text:list-level-style-bullet text:level="2" text:bullet-char="">
        <style:list-level-properties text:space-before="0.37cm" text:min-label-width="0.9cm"/>
        <style:text-properties fo:font-family="Symbol" style:font-charset="x-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9">
      <text:list-level-style-bullet text:level="1" text:bullet-char="•">
        <style:list-level-properties text:space-before="0.3cm" text:min-label-width="0.9cm"/>
        <style:text-properties fo:font-family="Arial" fo:color="#000000" fo:font-size="100%"/>
      </text:list-level-style-bullet>
      <text:list-level-style-bullet text:level="2" text:bullet-char="">
        <style:list-level-properties text:space-before="0.37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1.74cm" text:min-label-width="0.8cm"/>
        <style:text-properties fo:font-family="Wingdings" style:font-charset="x-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0">
      <text:list-level-style-bullet text:level="1" text:bullet-char="•">
        <style:list-level-properties text:space-before="0.3cm" text:min-label-width="0.9cm"/>
        <style:text-properties fo:font-family="Arial" fo:color="#000000" fo:font-size="100%"/>
      </text:list-level-style-bullet>
      <text:list-level-style-bullet text:level="2" text:bullet-char="">
        <style:list-level-properties text:space-before="0.37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1.74cm" text:min-label-width="0.8cm"/>
        <style:text-properties fo:font-family="Wingdings" style:font-charset="x-symbol" fo:color="#ffffff" fo:font-size="45%"/>
      </text:list-level-style-bullet>
      <text:list-level-style-bullet text:level="4" text:bullet-char="">
        <style:list-level-properties text:space-before="3.21cm" text:min-label-width="0.6cm"/>
        <style:text-properties fo:font-family="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1">
      <text:list-level-style-bullet text:level="1" text:bullet-char="•">
        <style:list-level-properties text:space-before="0.3cm" text:min-label-width="0.9cm"/>
        <style:text-properties fo:font-family="Arial" fo:color="#000000" fo:font-size="100%"/>
      </text:list-level-style-bullet>
      <text:list-level-style-bullet text:level="2" text:bullet-char="">
        <style:list-level-properties text:space-before="0.37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1.74cm" text:min-label-width="0.8cm"/>
        <style:text-properties fo:font-family="Wingdings" style:font-charset="x-symbol" fo:color="#ffffff" fo:font-size="45%"/>
      </text:list-level-style-bullet>
      <text:list-level-style-bullet text:level="4" text:bullet-char="">
        <style:list-level-properties text:space-before="3.21cm" text:min-label-width="0.6cm"/>
        <style:text-properties fo:font-family="Symbol" style:font-charset="x-symbol" fo:color="#ffffff" fo:font-size="75%"/>
      </text:list-level-style-bullet>
      <text:list-level-style-bullet text:level="5" text:bullet-char="">
        <style:list-level-properties text:space-before="4.48cm" text:min-label-width="0.6cm"/>
        <style:text-properties fo:font-family="Wingdings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2">
      <text:list-level-style-bullet text:level="1" text:bullet-char="•">
        <style:list-level-properties text:space-before="0.3cm" text:min-label-width="0.9cm"/>
        <style:text-properties fo:font-family="Arial" fo:color="#000000" fo:font-size="100%"/>
      </text:list-level-style-bullet>
      <text:list-level-style-bullet text:level="2" text:bullet-char="">
        <style:list-level-properties text:space-before="0.37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1.74cm" text:min-label-width="0.8cm"/>
        <style:text-properties fo:font-family="Wingdings" style:font-charset="x-symbol" fo:color="#ffffff" fo:font-size="45%"/>
      </text:list-level-style-bullet>
      <text:list-level-style-bullet text:level="4" text:bullet-char="">
        <style:list-level-properties text:space-before="3.21cm" text:min-label-width="0.6cm"/>
        <style:text-properties fo:font-family="Symbol" style:font-charset="x-symbol" fo:color="#ffffff" fo:font-size="75%"/>
      </text:list-level-style-bullet>
      <text:list-level-style-bullet text:level="5" text:bullet-char="">
        <style:list-level-properties text:space-before="4.48cm" text:min-label-width="0.6cm"/>
        <style:text-properties fo:font-family="Wingdings" style:font-charset="x-symbol" fo:color="#ffffff" fo:font-size="45%"/>
      </text:list-level-style-bullet>
      <text:list-level-style-bullet text:level="6" text:bullet-char="">
        <style:list-level-properties text:space-before="5.75cm" text:min-label-width="0.6cm"/>
        <style:text-properties fo:font-family="Wingdings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3">
      <text:list-level-style-bullet text:level="1" text:bullet-char="•">
        <style:list-level-properties text:space-before="0.3cm" text:min-label-width="0.9cm"/>
        <style:text-properties fo:font-family="Arial" fo:color="#000000" fo:font-size="100%"/>
      </text:list-level-style-bullet>
      <text:list-level-style-bullet text:level="2" text:bullet-char="">
        <style:list-level-properties text:space-before="0.37cm" text:min-label-width="0.9cm"/>
        <style:text-properties fo:font-family="Symbol" style:font-charset="x-symbol" fo:color="#ffffff" fo:font-size="75%"/>
      </text:list-level-style-bullet>
      <text:list-level-style-bullet text:level="3" text:bullet-char="">
        <style:list-level-properties text:space-before="1.74cm" text:min-label-width="0.8cm"/>
        <style:text-properties fo:font-family="Wingdings" style:font-charset="x-symbol" fo:color="#ffffff" fo:font-size="45%"/>
      </text:list-level-style-bullet>
      <text:list-level-style-bullet text:level="4" text:bullet-char="">
        <style:list-level-properties text:space-before="3.21cm" text:min-label-width="0.6cm"/>
        <style:text-properties fo:font-family="Symbol" style:font-charset="x-symbol" fo:color="#ffffff" fo:font-size="75%"/>
      </text:list-level-style-bullet>
      <text:list-level-style-bullet text:level="5" text:bullet-char="">
        <style:list-level-properties text:space-before="4.48cm" text:min-label-width="0.6cm"/>
        <style:text-properties fo:font-family="Wingdings" style:font-charset="x-symbol" fo:color="#ffffff" fo:font-size="45%"/>
      </text:list-level-style-bullet>
      <text:list-level-style-bullet text:level="6" text:bullet-char="">
        <style:list-level-properties text:space-before="5.75cm" text:min-label-width="0.6cm"/>
        <style:text-properties fo:font-family="Wingdings" style:font-charset="x-symbol" fo:color="#ffffff" fo:font-size="45%"/>
      </text:list-level-style-bullet>
      <text:list-level-style-bullet text:level="7" text:bullet-char="">
        <style:list-level-properties text:space-before="7.02cm" text:min-label-width="0.6cm"/>
        <style:text-properties fo:font-family="Wingdings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4">
      <text:list-level-style-number text:level="1" style:num-format="">
        <style:list-level-properties text:min-label-width="0.6cm"/>
        <style:text-properties fo:color="#f89b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5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6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3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8" draw:layer="backgroundobjects" svg:width="22.48cm" svg:height="2.119cm" svg:x="1.48cm" svg:y="1.12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PlaceHolder 2" presentation:style-name="Mpr2" draw:text-style-name="MP10" draw:layer="backgroundobjects" svg:width="11.221cm" svg:height="1.331cm" svg:x="1.491cm" svg:y="4.435cm" presentation:class="outline" presentation:user-transformed="true">
        <draw:text-box>
          <text:p text:style-name="MP9"><text:span text:style-name="MT3">Click to edit Master text styles</text:span></text:p>
        </draw:text-box>
      </draw:frame>
      <draw:frame draw:name="PlaceHolder 3" presentation:style-name="Mpr3" draw:text-style-name="MP10" draw:layer="backgroundobjects" svg:width="11.221cm" svg:height="6.321cm" svg:x="1.491cm" svg:y="5.747cm" presentation:class="outline" presentation:user-transformed="true">
        <draw:text-box>
          <text:list text:style-name="ML5">
            <text:list-item>
              <text:p text:style-name="MP9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" draw:text-style-name="MP10" draw:layer="backgroundobjects" svg:width="11.225cm" svg:height="1.331cm" svg:x="12.7cm" svg:y="4.435cm" presentation:class="outline" presentation:user-transformed="true">
        <draw:text-box>
          <text:p text:style-name="MP9"><text:span text:style-name="MT3">Click to edit Master text styles</text:span></text:p>
        </draw:text-box>
      </draw:frame>
      <draw:frame draw:name="PlaceHolder 5" presentation:style-name="Mpr3" draw:text-style-name="MP10" draw:layer="backgroundobjects" svg:width="11.225cm" svg:height="6.321cm" svg:x="12.7cm" svg:y="5.747cm" presentation:class="outline" presentation:user-transformed="true">
        <draw:text-box>
          <text:list text:style-name="ML5">
            <text:list-item>
              <text:p text:style-name="MP9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4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7" presentation:style-name="Mpr4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8" presentation:style-name="Mpr4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4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laceHolder 2" presentation:style-name="Mpr8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3" presentation:style-name="Mpr8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4" presentation:style-name="Mpr8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5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1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2" presentation:style-name="Mpr11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3" presentation:style-name="Mpr11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6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4" draw:text-style-name="MP22" draw:layer="backgroundobjects" svg:width="8.354cm" svg:height="2.419cm" svg:x="1.27cm" svg:y="0.569cm" presentation:class="title" presentation:user-transformed="true">
        <draw:text-box>
          <text:p text:style-name="MP21"><text:span text:style-name="MT11">Click to edit Master title style</text:span></text:p>
        </draw:text-box>
      </draw:frame>
      <draw:frame draw:name="PlaceHolder 2" presentation:style-name="Mpr15" draw:text-style-name="MP27" draw:layer="backgroundobjects" svg:width="14.197cm" svg:height="12.192cm" svg:x="9.931cm" svg:y="0.569cm" presentation:class="outline" presentation:user-transformed="true">
        <draw:text-box>
          <text:list text:style-name="ML15">
            <text:list-item>
              <text:p text:style-name="MP23"><text:span text:style-name="MT12">Click to edit Master text styles</text:span></text:p>
            </text:list-item>
          </text:list>
          <text:list text:style-name="ML16">
            <text:list-item>
              <text:list>
                <text:list-item>
                  <text:p text:style-name="MP24"><text:span text:style-name="MT13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25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5" draw:text-style-name="MP29" draw:layer="backgroundobjects" svg:width="8.354cm" svg:height="9.771cm" svg:x="1.27cm" svg:y="2.99cm" presentation:class="outline" presentation:user-transformed="true">
        <draw:text-box>
          <text:p text:style-name="MP28"><text:span text:style-name="MT16">Click to edit Master text styles</text:span></text:p>
        </draw:text-box>
      </draw:frame>
      <draw:frame draw:name="PlaceHolder 4" presentation:style-name="Mpr16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5" presentation:style-name="Mpr16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6" presentation:style-name="Mpr16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7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9" draw:text-style-name="MP8" draw:layer="backgroundobjects" svg:width="22.192cm" svg:height="4.566cm" svg:x="0.994cm" svg:y="4.322cm" presentation:class="title" presentation:user-transformed="true">
        <draw:text-box>
          <text:p text:style-name="MP7"><text:span text:style-name="MT2">Click to edit </text:span><text:span text:style-name="MT2"><text:line-break/></text:span><text:span text:style-name="MT2">Master title style</text:span></text:p>
        </draw:text-box>
      </draw:frame>
      <draw:frame draw:name="PlaceHolder 2" presentation:style-name="Mpr20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3" presentation:style-name="Mpr20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4" presentation:style-name="Mpr20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draw:frame draw:name="PlaceHolder 5" presentation:style-name="Mpr21" draw:text-style-name="MP27" draw:layer="backgroundobjects" svg:width="22.858cm" svg:height="8.285cm" svg:x="1.27cm" svg:y="3.343cm" presentation:class="outline" presentation:user-transformed="true">
        <draw:text-box>
          <text:list text:style-name="ML15">
            <text:list-item>
              <text:p text:style-name="MP23"><text:span text:style-name="MT12">Click to edit the outline text format</text:span></text:p>
            </text:list-item>
          </text:list>
          <text:list text:style-name="ML21">
            <text:list-item>
              <text:list>
                <text:list-item>
                  <text:p text:style-name="MP24"><text:span text:style-name="MT13">Second Outline Level</text:span></text:p>
                </text:list-item>
              </text:list>
            </text:list-item>
          </text:list>
          <text:list text:style-name="ML22">
            <text:list-item>
              <text:list>
                <text:list-item>
                  <text:list>
                    <text:list-item>
                      <text:p text:style-name="MP25"><text:span text:style-name="MT14">Third Outline Level</text:span></text:p>
                    </text:list-item>
                  </text:list>
                </text:list-item>
              </text:list>
            </text:list-item>
          </text:list>
          <text:list text:style-name="M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0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0"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0cm" svg:height="0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8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4" draw:text-style-name="MP22" draw:layer="backgroundobjects" svg:width="15.238cm" svg:height="1.179cm" svg:x="4.979cm" svg:y="10.001cm" presentation:class="title" presentation:user-transformed="true">
        <draw:text-box>
          <text:p text:style-name="MP21"><text:span text:style-name="MT11">Click to edit Master title style</text:span></text:p>
        </draw:text-box>
      </draw:frame>
      <draw:frame draw:name="PlaceHolder 2" presentation:style-name="Mpr25" draw:text-style-name="MP27" draw:layer="backgroundobjects" svg:width="15.238cm" svg:height="8.571cm" svg:x="4.979cm" svg:y="1.277cm" presentation:class="outline" presentation:user-transformed="true">
        <draw:text-box>
          <text:list text:style-name="ML27">
            <text:list-item>
              <text:p text:style-name="MP31"><text:span text:style-name="MT12">Click to edit the outline text format</text:span></text:p>
            </text:list-item>
          </text:list>
          <text:list text:style-name="ML28">
            <text:list-item>
              <text:list>
                <text:list-item>
                  <text:p text:style-name="MP32"><text:span text:style-name="MT12">Second Outline Level</text:span></text:p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p text:style-name="MP33"><text:span text:style-name="MT12">Third Outline Level</text:span></text:p>
                    </text:list-item>
                  </text:list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4"><text:span text:style-name="MT1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4"><text:span text:style-name="MT1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5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5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6" draw:text-style-name="MP29" draw:layer="backgroundobjects" svg:width="15.238cm" svg:height="1.675cm" svg:x="4.979cm" svg:y="11.182cm" presentation:class="outline" presentation:user-transformed="true">
        <draw:text-box>
          <text:p text:style-name="MP28"><text:span text:style-name="MT16">Click to edit Master text styles</text:span></text:p>
        </draw:text-box>
      </draw:frame>
      <draw:frame draw:name="PlaceHolder 4" presentation:style-name="Mpr2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5" presentation:style-name="Mpr2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6" presentation:style-name="Mpr2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9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0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laceHolder 2" presentation:style-name="Mpr31" draw:text-style-name="MP27" draw:layer="backgroundobjects" svg:width="22.858cm" svg:height="9.427cm" svg:x="1.27cm" svg:y="3.334cm" presentation:class="outline" presentation:user-transformed="true">
        <draw:text-box>
          <text:list text:style-name="ML15">
            <text:list-item>
              <text:p text:style-name="MP23"><text:span text:style-name="MT12">Click to edit Master text styles</text:span></text:p>
            </text:list-item>
          </text:list>
          <text:list text:style-name="ML16">
            <text:list-item>
              <text:list>
                <text:list-item>
                  <text:p text:style-name="MP24"><text:span text:style-name="MT13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25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4" presentation:style-name="Mpr3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5" presentation:style-name="Mpr3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0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5" draw:text-style-name="MP20" draw:layer="backgroundobjects" svg:width="5.713cm" svg:height="12.189cm" svg:x="18.415cm" svg:y="0.572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laceHolder 2" presentation:style-name="Mpr36" draw:text-style-name="MP27" draw:layer="backgroundobjects" svg:width="16.72cm" svg:height="12.189cm" svg:x="1.27cm" svg:y="0.572cm" presentation:class="outline" presentation:user-transformed="true">
        <draw:text-box>
          <text:list text:style-name="ML15">
            <text:list-item>
              <text:p text:style-name="MP23"><text:span text:style-name="MT12">Click to edit Master text styles</text:span></text:p>
            </text:list-item>
          </text:list>
          <text:list text:style-name="ML16">
            <text:list-item>
              <text:list>
                <text:list-item>
                  <text:p text:style-name="MP24"><text:span text:style-name="MT13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25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4" presentation:style-name="Mpr3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5" presentation:style-name="Mpr3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draw:frame draw:name="Picture 6" draw:style-name="Mgr11" draw:text-style-name="MP36" draw:layer="backgroundobjects" svg:width="4.064cm" svg:height="1.462cm" svg:x="10.579cm" svg:y="6.462cm">
        <draw:image xlink:href="Pictures/100000010000012C0000006C69D056BB.png" xlink:type="simple" xlink:show="embed" xlink:actuate="onLoad" draw:mime-type="image/png">
          <text:p/>
        </draw:image>
        <svg:desc>E:\websites\free-power-point-templates\2012\logos.png</svg:desc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2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0" draw:text-style-name="MP8" draw:layer="backgroundobjects" svg:width="22.904cm" svg:height="2.119cm" svg:x="1.227cm" svg:y="0.97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PlaceHolder 2" presentation:style-name="Mpr41" draw:text-style-name="MP40" draw:layer="backgroundobjects" svg:width="22.904cm" svg:height="8.67cm" svg:x="1.186cm" svg:y="3.933cm" presentation:class="outline" presentation:user-transformed="true">
        <draw:text-box>
          <text:list text:style-name="ML5">
            <text:list-item>
              <text:p text:style-name="MP37"><text:span text:style-name="MT1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37"><text:span text:style-name="MT1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4" presentation:style-name="Mpr4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5" presentation:style-name="Mpr4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3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5" draw:text-style-name="MP8" draw:layer="backgroundobjects" svg:width="16.242cm" svg:height="2.013cm" svg:x="7.886cm" svg:y="1.252cm" presentation:class="title" presentation:user-transformed="true">
        <draw:text-box>
          <text:p text:style-name="MP41"><text:span text:style-name="MT18">Click to edit Master title style</text:span></text:p>
        </draw:text-box>
      </draw:frame>
      <draw:frame draw:name="PlaceHolder 2" presentation:style-name="Mpr46" draw:text-style-name="MP40" draw:layer="backgroundobjects" svg:width="16.242cm" svg:height="9.751cm" svg:x="7.886cm" svg:y="3.373cm" presentation:class="outline" presentation:user-transformed="true">
        <draw:text-box>
          <text:list text:style-name="ML5">
            <text:list-item>
              <text:p text:style-name="MP37"><text:span text:style-name="MT1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37"><text:span text:style-name="MT1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4" presentation:style-name="Mpr4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5" presentation:style-name="Mpr4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_31__5f_Title_20_and_20_Content-title" draw:layer="backgroundobjects" svg:width="0cm" svg:height="0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4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0" draw:text-style-name="MP43" draw:layer="backgroundobjects" svg:width="21.588cm" svg:height="2.836cm" svg:x="2.006cm" svg:y="9.181cm" presentation:class="title" presentation:user-transformed="true">
        <draw:text-box>
          <text:p text:style-name="MP42"><text:span text:style-name="MT19">Click to edit Master title style</text:span></text:p>
        </draw:text-box>
      </draw:frame>
      <draw:frame draw:name="PlaceHolder 2" presentation:style-name="Mpr51" draw:text-style-name="MP22" draw:layer="backgroundobjects" svg:width="21.588cm" svg:height="3.123cm" svg:x="2.006cm" svg:y="6.056cm" presentation:class="outline" presentation:user-transformed="true">
        <draw:text-box>
          <text:p text:style-name="MP44"><text:span text:style-name="MT20">Click to edit Master text styles</text:span></text:p>
        </draw:text-box>
      </draw:frame>
      <draw:frame draw:name="PlaceHolder 3" presentation:style-name="Mpr5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4" presentation:style-name="Mpr5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5" presentation:style-name="Mpr5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5" draw:text-style-name="MP6" draw:layer="backgroundobjects" svg:width="23.303cm" svg:height="1.45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5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laceHolder 2" presentation:style-name="Mpr56" draw:text-style-name="MP40" draw:layer="backgroundobjects" svg:width="11.216cm" svg:height="9.427cm" svg:x="1.27cm" svg:y="3.334cm" presentation:class="outline" presentation:user-transformed="true">
        <draw:text-box>
          <text:list text:style-name="ML15">
            <text:list-item>
              <text:p text:style-name="MP37"><text:span text:style-name="MT13">Click to edit Master text styles</text:span></text:p>
            </text:list-item>
          </text:list>
          <text:list text:style-name="ML16">
            <text:list-item>
              <text:list>
                <text:list-item>
                  <text:p text:style-name="MP38"><text:span text:style-name="MT14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39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5"><text:span text:style-name="MT2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5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6" draw:text-style-name="MP40" draw:layer="backgroundobjects" svg:width="11.216cm" svg:height="9.427cm" svg:x="12.912cm" svg:y="3.334cm" presentation:class="outline" presentation:user-transformed="true">
        <draw:text-box>
          <text:list text:style-name="ML15">
            <text:list-item>
              <text:p text:style-name="MP37"><text:span text:style-name="MT13">Click to edit Master text styles</text:span></text:p>
            </text:list-item>
          </text:list>
          <text:list text:style-name="ML16">
            <text:list-item>
              <text:list>
                <text:list-item>
                  <text:p text:style-name="MP38"><text:span text:style-name="MT14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39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5"><text:span text:style-name="MT2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5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5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PlaceHolder 5" presentation:style-name="Mpr5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9"><presentation:footer/></text:span></text:p>
        </draw:text-box>
      </draw:frame>
      <draw:frame draw:name="PlaceHolder 6" presentation:style-name="Mpr5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6" draw:text-style-name="MP47" draw:layer="backgroundobjects" svg:width="23.304cm" svg:height="1.437cm" svg:x="-0.025cm" svg:y="14.483cm">
        <text:p text:style-name="MP46"><text:span text:style-name="MT1">This presentation uses a free template provided by FPPT.com</text:span></text:p>
        <text:p text:style-name="MP46"><text:span text:style-name="MT1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8" draw:layer="backgroundobjects" svg:width="22.193cm" svg:height="4.567cm" svg:x="0.994cm" svg:y="4.322cm" presentation:class="title" presentation:user-transformed="true">
        <draw:text-box>
          <text:p text:style-name="MP48"><text:span text:style-name="MT2">Click to edit </text:span><text:span text:style-name="MT2"><text:line-break/></text:span><text:span text:style-name="MT2">Master title style</text:span></text:p>
        </draw:text-box>
      </draw:frame>
      <draw:frame draw:name="Subtitle 2" presentation:style-name="Mpr61" draw:text-style-name="MP50" draw:layer="backgroundobjects" svg:width="22.153cm" svg:height="1.904cm" svg:x="-0.276cm" svg:y="9.935cm" presentation:class="subtitle" presentation:user-transformed="true">
        <draw:text-box>
          <text:p text:style-name="MP49"><text:span text:style-name="MT22">Click to edit Master subtitle style</text:span></text:p>
        </draw:text-box>
      </draw:frame>
      <draw:frame draw:name="Date Placeholder 3" presentation:style-name="Mpr62" draw:text-style-name="MP15" draw:layer="backgroundobjects" svg:width="5.926cm" svg:height="0.76cm" svg:x="1.27cm" svg:y="13.242cm" presentation:class="date-time" presentation:user-transformed="true">
        <draw:text-box>
          <text:p text:style-name="MP51"><text:span text:style-name="MT8"><presentation:date-time/></text:span></text:p>
        </draw:text-box>
      </draw:frame>
      <draw:frame draw:name="Footer Placeholder 4" presentation:style-name="Mpr62" draw:text-style-name="MP15" draw:layer="backgroundobjects" svg:width="8.042cm" svg:height="0.76cm" svg:x="8.678cm" svg:y="13.242cm" presentation:class="footer" presentation:user-transformed="true">
        <draw:text-box>
          <text:p text:style-name="MP52"><text:span text:style-name="MT23"><presentation:footer/></text:span></text:p>
        </draw:text-box>
      </draw:frame>
      <draw:frame draw:name="Slide Number Placeholder 5" presentation:style-name="Mpr62" draw:text-style-name="MP15" draw:layer="backgroundobjects" svg:width="5.926cm" svg:height="0.76cm" svg:x="18.203cm" svg:y="13.242cm" presentation:class="page-number" presentation:user-transformed="true">
        <draw:text-box>
          <text:p text:style-name="MP53"><text:span text:style-name="MT8"><text:page-number>&lt;number&gt;</text:page-number></text:span></text:p>
        </draw:text-box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23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23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23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2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8-01T15:40:51</meta:creation-date>
    <dc:language>en-IE</dc:language>
    <dc:date>2026-07-15T18:16:15.639697911</dc:date>
    <meta:editing-cycles>6</meta:editing-cycles>
    <meta:editing-duration>PT22M52S</meta:editing-duration>
    <meta:generator>LibreOffice/26.2.4.2$Linux_X86_64 LibreOffice_project/64a984c51f4702dbd3710b13428c673a2f1292e7</meta:generator>
    <meta:document-statistic meta:object-count="199"/>
    <meta:user-defined meta:name="AppVersion">15.0000</meta:user-defined>
    <meta:user-defined meta:name="Notes" meta:value-type="float">1</meta:user-defined>
    <meta:user-defined meta:name="PresentationFormat">On-screen Show (16:9)</meta:user-defined>
    <meta:user-defined meta:name="Slides" meta:value-type="float">5</meta:user-defined>
  </office:meta>
</office:document-meta>
</file>